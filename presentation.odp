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C000000AD665F3482.jpg" manifest:media-type="image/jpeg"/>
  <manifest:file-entry manifest:full-path="Pictures/100000010000087C000002D4DA012295.png" manifest:media-type="image/png"/>
  <manifest:file-entry manifest:full-path="Pictures/10000000000004D10000026687E003CC.png" manifest:media-type="image/png"/>
  <manifest:file-entry manifest:full-path="Pictures/100000010000033C0000015FC83F089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/>
    <style:font-face style:name="Noto Sans" svg:font-family="'Noto Sans'" style:font-family-generic="roman" style:font-pitch="variable"/>
    <style:font-face style:name="SF UI Display Light" svg:font-family="'SF UI Display Light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Content-title">
      <style:graphic-properties fo:min-height="1.261cm" loext:decorative="false"/>
      <style:paragraph-properties style:writing-mode="lr-tb"/>
    </style:style>
    <style:style style:name="pr5" style:family="presentation" style:parent-style-name="Conten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Content-outline1">
      <style:graphic-properties fo:min-height="8.90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5cm" fo:margin-bottom="0cm" fo:line-height="100%" fo:text-align="justify" fo:text-indent="0cm"/>
    </style:style>
    <style:style style:name="P8" style:family="paragraph">
      <style:paragraph-properties fo:margin-left="1.2cm" fo:margin-right="0cm" fo:margin-top="0.5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cm" fo:margin-bottom="0.35cm" fo:line-height="100%" fo:text-align="end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left="1.2cm" fo:margin-right="0cm" fo:margin-top="0.5cm" fo:margin-bottom="0cm" fo:line-height="100%" fo:text-align="justify" fo:text-indent="0cm" loext:tab-stop-distance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81a1" loext:opacity="100%" style:text-outline="false" style:text-line-through-style="none" style:text-line-through-type="none" style:text-position="0% 100%" style:font-name="Arial1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81a1" loext:opacity="100%" style:text-outline="false" style:text-line-through-style="none" style:text-line-through-type="none" style:text-position="0% 100%" style:font-name="SF UI Display Light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81a1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81a0" loext:opacity="100%" style:text-outline="false" style:text-line-through-style="none" style:text-line-through-type="none" style:text-position="0% 100%" style:font-name="Arial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Microsoft YaHei1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81a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81a0" loext:opacity="100%" style:text-outline="false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81a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►">
        <style:list-level-properties text:space-before="0.3cm" text:min-label-width="0.9cm"/>
        <style:text-properties fo:font-family="OpenSymbol" style:font-charset="x-symbol" style:use-window-font-color="true" fo:font-size="75%"/>
      </text:list-level-style-bullet>
      <text:list-level-style-bullet text:level="2" text:bullet-char="►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►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►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►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►">
        <style:list-level-properties text:space-before="6.6cm" text:min-label-width="0.6cm"/>
        <style:text-properties fo:font-family="OpenSymbol" style:font-charset="x-symbol" style:use-window-font-color="true" fo:font-size="75%"/>
      </text:list-level-style-bullet>
      <text:list-level-style-bullet text:level="7" text:bullet-char="►">
        <style:list-level-properties text:space-before="7.8cm" text:min-label-width="0.6cm"/>
        <style:text-properties fo:font-family="OpenSymbol" style:font-charset="x-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75%"/>
      </text:list-level-style-bullet>
    </text:list-style>
  </office:automatic-styles>
  <office:body>
    <office:presentation>
      <draw:page draw:name="АТТЕСТАЦИОННАЯ ПРЕЗЕНТАЦИЯ" draw:style-name="dp1" draw:master-page-name="Title" presentation:presentation-page-layout-name="AL1T0">
        <draw:frame draw:name="PlaceHolder 1" presentation:style-name="pr1" draw:text-style-name="P2" draw:layer="layout" svg:width="25.394cm" svg:height="1.456cm" svg:x="0.001cm" svg:y="10.795cm" presentation:class="title" presentation:user-transformed="true">
          <draw:text-box>
            <text:p text:style-name="P1"><text:span text:style-name="T1">АТТЕСТАЦИОННАЯ</text:span><text:span text:style-name="T2"> </text:span><text:span text:style-name="T1">ПРЕЗЕНТАЦИЯ</text:span></text:p>
          </draw:text-box>
        </draw:frame>
        <draw:frame draw:style-name="gr1" draw:text-style-name="P3" draw:layer="layout" svg:width="25.394cm" svg:height="8.25cm" svg:x="0.001cm" svg:y="2.54cm">
          <draw:image xlink:href="Pictures/100000010000087C000002D4DA012295.png" xlink:type="simple" xlink:show="embed" xlink:actuate="onLoad" draw:mime-type="image/png">
            <text:p/>
          </draw:image>
        </draw:frame>
        <draw:custom-shape draw:style-name="gr2" draw:text-style-name="P5" draw:layer="layout" svg:width="13.96cm" svg:height="1.775cm" svg:x="10.853cm" svg:y="0.393cm">
          <text:p text:style-name="P4"><text:span text:style-name="T3">Кузнецов Игорь Витальевич</text:span></text:p>
          <text:p text:style-name="P4"><text:span text:style-name="T3">старший инженер системный программи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Работа в НПО Криста" draw:style-name="dp3" draw:master-page-name="Content" presentation:presentation-page-layout-name="AL2T1">
        <draw:frame draw:name="PlaceHolder 2" presentation:style-name="pr3" draw:text-style-name="P9" draw:layer="layout" svg:width="22.858cm" svg:height="9.151cm" svg:x="1.27cm" svg:y="2.477cm" presentation:class="outline">
          <draw:text-box>
            <text:list text:style-name="L3">
              <text:list-item>
                <text:p text:style-name="P7"><text:span text:style-name="T4">2015 г.</text:span><text:span text:style-name="T5"> - </text:span><text:span text:style-name="T6">НПО Криста, проект “Планирование бюджета”</text:span></text:p>
              </text:list-item>
              <text:list-item>
                <text:p text:style-name="P7"><text:span text:style-name="T7">2016 г.</text:span><text:span text:style-name="T6"> - атестация на инженера системного программиста 1 кт.</text:span></text:p>
              </text:list-item>
              <text:list-item>
                <text:p text:style-name="P7"><text:span text:style-name="T7">2017 г.</text:span><text:span text:style-name="T6"> - разработка контролей по данным “Web-консолидации”</text:span></text:p>
              </text:list-item>
              <text:list-item>
                <text:p text:style-name="P7"><text:span text:style-name="T7">2018 г.</text:span><text:span text:style-name="T6"> - доработка синхронизации с НСИ </text:span></text:p>
              </text:list-item>
              <text:list-item>
                <text:p text:style-name="P7"><text:span text:style-name="T7">2021 г.</text:span><text:span text:style-name="T6"> - аттестация на старшего инженера системного программиста</text:span></text:p>
              </text:list-item>
            </text:list>
            <text:p text:style-name="P8"><text:span text:style-name="T6"/></text:p>
          </draw:text-box>
        </draw:frame>
        <draw:frame presentation:style-name="pr4" draw:layer="layout" svg:width="19.789cm" svg:height="1.261cm" svg:x="4.339cm" svg:y="0.56cm" presentation:class="title">
          <draw:text-box>
            <text:p text:style-name="P10"><text:span text:style-name="T8">Работа в НПО Криста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Архитектура “Планирования бюджета”" draw:style-name="dp3" draw:master-page-name="Content" presentation:presentation-page-layout-name="AL3T19">
        <draw:frame draw:style-name="gr1" draw:text-style-name="P3" draw:layer="layout" svg:width="24.384cm" svg:height="12.139cm" svg:x="0.191cm" svg:y="1.914cm">
          <draw:image xlink:href="Pictures/10000000000004D10000026687E003CC.png" xlink:type="simple" xlink:show="embed" xlink:actuate="onLoad" draw:mime-type="image/png">
            <text:p/>
          </draw:image>
        </draw:frame>
        <draw:frame presentation:style-name="pr4" draw:layer="layout" svg:width="19.789cm" svg:height="1.261cm" svg:x="4.339cm" svg:y="0.56cm" presentation:class="title">
          <draw:text-box>
            <text:p text:style-name="P10"><text:span text:style-name="T8">Архитектура “Планирования бюджета”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Участие в сложных комплексных контрактах" draw:style-name="dp3" draw:master-page-name="Content" presentation:presentation-page-layout-name="AL2T1">
        <draw:frame draw:name="PlaceHolder 2" presentation:style-name="pr3" draw:text-style-name="P9" draw:layer="layout" svg:width="22.858cm" svg:height="9.151cm" svg:x="1.27cm" svg:y="2.477cm" presentation:class="outline">
          <draw:text-box>
            <text:list text:style-name="L3">
              <text:list-item>
                <text:p text:style-name="P7"><text:span text:style-name="T6">источник данных методик ОБАС</text:span></text:p>
              </text:list-item>
              <text:list-item>
                <text:p text:style-name="P7"><text:span text:style-name="T6">синхронизация с НСИ для Росгвардии</text:span></text:p>
              </text:list-item>
              <text:list-item>
                <text:p text:style-name="P7"><text:span text:style-name="T6">блок "Перспективный финансовый план"</text:span></text:p>
              </text:list-item>
              <text:list-item>
                <text:p text:style-name="P7"><text:span text:style-name="T9">визуализации факта подписания заявок на внесение изменений для <text:s/>Омской области</text:span></text:p>
              </text:list-item>
              <text:list-item>
                <text:p text:style-name="P7"><text:span text:style-name="T9">адаптивный источник данных для Алтайского края на основе базового, обогащенного данными из таблицы сопоставления</text:span></text:p>
              </text:list-item>
            </text:list>
            <text:p text:style-name="P11"><text:span text:style-name="T9"/></text:p>
          </draw:text-box>
        </draw:frame>
        <draw:frame presentation:style-name="pr4" draw:layer="layout" svg:width="19.789cm" svg:height="1.261cm" svg:x="4.339cm" svg:y="0.56cm" presentation:class="title">
          <draw:text-box>
            <text:p text:style-name="P12"><text:span text:style-name="T10">Участие в сложных комплексных контрактах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Техническое лидерство" draw:style-name="dp3" draw:master-page-name="Content" presentation:presentation-page-layout-name="AL3T19">
        <draw:frame draw:name="PlaceHolder 1" presentation:style-name="pr3" draw:text-style-name="P9" draw:layer="layout" svg:width="22.858cm" svg:height="9.151cm" svg:x="1.27cm" svg:y="2.477cm" presentation:class="outline" presentation:user-transformed="true">
          <draw:text-box>
            <text:list text:style-name="L3">
              <text:list-item>
                <text:p text:style-name="P7"><text:span text:style-name="T6">индикация состояний документов</text:span></text:p>
              </text:list-item>
              <text:list-item>
                <text:p text:style-name="P7"><text:span text:style-name="T9">конфигурация стадий/статусов документов</text:span></text:p>
              </text:list-item>
              <text:list-item>
                <text:p text:style-name="P7"><text:span text:style-name="T9">механизм сериализации/десериализации данных в формат json в контексте протокола выполнения бизнес операций</text:span></text:p>
              </text:list-item>
              <text:list-item>
                <text:p text:style-name="P7"><text:span text:style-name="T9">рефакторинг операций блока “РРО”</text:span></text:p>
              </text:list-item>
              <text:list-item>
                <text:p text:style-name="P7"><text:span text:style-name="T9">поддержка источников данных для блока “Закон” </text:span></text:p>
              </text:list-item>
              <text:list-item>
                <text:p text:style-name="P7"><text:span text:style-name="T9">мониторинг логов</text:span></text:p>
              </text:list-item>
            </text:list>
            <text:p text:style-name="P8"><text:span text:style-name="T9"/></text:p>
          </draw:text-box>
        </draw:frame>
        <draw:frame presentation:style-name="pr4" draw:layer="layout" svg:width="19.789cm" svg:height="1.261cm" svg:x="4.339cm" svg:y="0.56cm" presentation:class="title">
          <draw:text-box>
            <text:p text:style-name="P12"><text:span text:style-name="T10">Техническое</text:span><text:span text:style-name="T11"> лидерство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Индикация состояний документов" draw:style-name="dp3" draw:master-page-name="Content" presentation:presentation-page-layout-name="AL3T19">
        <draw:frame draw:name="PlaceHolder 1" presentation:style-name="pr3" draw:text-style-name="P9" draw:layer="layout" svg:width="22.855cm" svg:height="9.956cm" svg:x="1.27cm" svg:y="2.682cm" presentation:class="outline" presentation:user-transformed="true">
          <draw:text-box>
            <text:p text:style-name="P13"><text:span text:style-name="T6"><text:s/></text:span></text:p>
            <text:p text:style-name="P8"><text:span text:style-name="T6"/></text:p>
          </draw:text-box>
        </draw:frame>
        <draw:frame draw:style-name="gr1" draw:text-style-name="P3" draw:layer="layout" svg:width="21.905cm" svg:height="9.284cm" svg:x="1.787cm" svg:y="2.519cm">
          <draw:image xlink:href="Pictures/100000010000033C0000015FC83F089B.png" xlink:type="simple" xlink:show="embed" xlink:actuate="onLoad" draw:mime-type="image/png">
            <text:p/>
          </draw:image>
        </draw:frame>
        <draw:frame presentation:style-name="pr4" draw:layer="layout" svg:width="19.789cm" svg:height="1.261cm" svg:x="4.339cm" svg:y="0.56cm" presentation:class="title" presentation:user-transformed="true">
          <draw:text-box>
            <text:p text:style-name="P12"><text:span text:style-name="T10">Индикация состояний документов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Индикация состояний документов (2)" draw:style-name="dp3" draw:master-page-name="Content" presentation:presentation-page-layout-name="AL4T3">
        <draw:frame presentation:style-name="pr4" draw:layer="layout" svg:width="19.789cm" svg:height="1.261cm" svg:x="4.339cm" svg:y="0.56cm" presentation:class="title" presentation:user-transformed="true">
          <draw:text-box>
            <text:p text:style-name="P12"><text:span text:style-name="T10">Индикация состояний документов</text:span></text:p>
          </draw:text-box>
        </draw:frame>
        <draw:frame presentation:style-name="pr6" draw:layer="layout" svg:width="11.154cm" svg:height="9.151cm" svg:x="1.27cm" svg:y="2.477cm" presentation:class="outline" presentation:user-transformed="true">
          <draw:text-box>
            <text:list text:style-name="L4">
              <text:list-item>
                <text:p>Добавить скриншот с настройкой индикатора</text:p>
              </text:list-item>
            </text:list>
          </draw:text-box>
        </draw:frame>
        <draw:frame presentation:style-name="pr6" draw:layer="layout" svg:width="11.154cm" svg:height="9.151cm" svg:x="12.983cm" svg:y="2.477cm" presentation:class="outline" presentation:user-transformed="true">
          <draw:text-box>
            <text:list text:style-name="L4">
              <text:list-item>
                <text:p>Добавить скриншот с визуальным отображением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2T1">
        <draw:frame presentation:style-name="pr4" draw:layer="layout" svg:width="19.789cm" svg:height="1.261cm" svg:x="4.339cm" svg:y="0.56cm" presentation:class="title" presentation:user-transformed="true">
          <draw:text-box>
            <text:p>Сериализация/десериализация в json</text:p>
          </draw:text-box>
        </draw:frame>
        <draw:frame presentation:style-name="pr6" draw:layer="layout" svg:width="22.858cm" svg:height="9.151cm" svg:x="1.27cm" svg:y="2.477cm" presentation:class="outline" presentation:placeholder="true" presentation:user-transformed="true">
          <draw:text-box/>
        </draw:frame>
        <presentation:notes draw:style-name="dp4">
          <draw:page-thumbnail draw:style-name="gr3" draw:layer="layout" svg:width="0.001cm" svg:height="0.001cm" svg:x="0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4T3">
        <draw:frame presentation:style-name="pr4" draw:layer="layout" svg:width="19.789cm" svg:height="1.261cm" svg:x="4.339cm" svg:y="0.56cm" presentation:class="title">
          <draw:text-box>
            <text:p>Рефакторинг блока РРО</text:p>
          </draw:text-box>
        </draw:frame>
        <draw:frame presentation:style-name="pr6" draw:layer="layout" svg:width="11.154cm" svg:height="9.151cm" svg:x="1.27cm" svg:y="2.477cm" presentation:class="outline">
          <draw:text-box>
            <text:list text:style-name="L4">
              <text:list-item>
                <text:p>Проблема</text:p>
              </text:list-item>
            </text:list>
          </draw:text-box>
        </draw:frame>
        <draw:frame presentation:style-name="pr6" draw:layer="layout" svg:width="11.154cm" svg:height="9.151cm" svg:x="12.983cm" svg:y="2.477cm" presentation:class="outline">
          <draw:text-box>
            <text:list text:style-name="L4">
              <text:list-item>
                <text:p>Результат рефакторинга</text:p>
              </text:list-item>
            </text:list>
          </draw:text-box>
        </draw:frame>
        <presentation:notes draw:style-name="dp4">
          <draw:page-thumbnail draw:style-name="gr3" draw:layer="layout" svg:width="0.001cm" svg:height="0.001cm" svg:x="0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/>
    <style:font-face style:name="Noto Sans" svg:font-family="'Noto Sans'" style:font-family-generic="roman" style:font-pitch="variable"/>
    <style:font-face style:name="SF UI Display Light" svg:font-family="'SF UI Display Light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OpenEnd_20_5_20_35" draw:display-name="msArrowOpenEnd 5 35" svg:viewBox="0 0 350 350" svg:d="M175 0l175 312-38 38-112-213v213h-50v-213l-113 213-37-3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0081a1" loext:opacity="100%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►">
            <style:list-level-properties text:space-before="0.3cm" text:min-label-width="0.9cm"/>
            <style:text-properties fo:font-family="OpenSymbol" style:font-charset="x-symbol" style:use-window-font-color="true" fo:font-size="75%"/>
          </text:list-level-style-bullet>
          <text:list-level-style-bullet text:level="2" text:bullet-char="►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►">
            <style:list-level-properties text:space-before="2.8cm" text:min-label-width="0.8cm"/>
            <style:text-properties fo:font-family="OpenSymbol" style:font-charset="x-symbol" style:use-window-font-color="true" fo:font-size="75%"/>
          </text:list-level-style-bullet>
          <text:list-level-style-bullet text:level="4" text:bullet-char="►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►">
            <style:list-level-properties text:space-before="5.4cm" text:min-label-width="0.6cm"/>
            <style:text-properties fo:font-family="OpenSymbol" style:font-charset="x-symbol" style:use-window-font-color="true" fo:font-size="75%"/>
          </text:list-level-style-bullet>
          <text:list-level-style-bullet text:level="6" text:bullet-char="►">
            <style:list-level-properties text:space-before="6.6cm" text:min-label-width="0.6cm"/>
            <style:text-properties fo:font-family="OpenSymbol" style:font-charset="x-symbol" style:use-window-font-color="true" fo:font-size="75%"/>
          </text:list-level-style-bullet>
          <text:list-level-style-bullet text:level="7" text:bullet-char="►">
            <style:list-level-properties text:space-before="7.8cm" text:min-label-width="0.6cm"/>
            <style:text-properties fo:font-family="OpenSymbol" style:font-charset="x-symbol" style:use-window-font-color="true" fo:font-size="7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7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7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Content-outline2" style:family="presentation" style:parent-style-name="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 loext:hyphenation-no-caps="false" loext:hyphenation-no-last-word="false"/>
    </style:style>
    <style:style style:name="Content-outline3" style:family="presentation" style:parent-style-name="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 loext:hyphenation-no-caps="false" loext:hyphenation-no-last-word="false"/>
    </style:style>
    <style:style style:name="Content-outline4" style:family="presentation" style:parent-style-name="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 loext:hyphenation-no-caps="false" loext:hyphenation-no-last-word="false"/>
    </style:style>
    <style:style style:name="Content-outline5" style:family="presentation" style:parent-style-name="Content-outline4">
      <style:paragraph-properties fo:margin-top="0.1cm" fo:margin-bottom="0cm"/>
      <style:text-properties style:font-size-asian="20pt" style:font-size-complex="20pt" fo:hyphenate="false" loext:hyphenation-no-caps="false" loext:hyphenation-no-last-word="false"/>
    </style:style>
    <style:style style:name="Content-outline6" style:family="presentation" style:parent-style-name="Content-outline5">
      <style:paragraph-properties fo:margin-top="0.1cm" fo:margin-bottom="0cm"/>
      <style:text-properties style:font-size-asian="20pt" style:font-size-complex="20pt" fo:hyphenate="false" loext:hyphenation-no-caps="false" loext:hyphenation-no-last-word="false"/>
    </style:style>
    <style:style style:name="Content-outline7" style:family="presentation" style:parent-style-name="Content-outline6">
      <style:paragraph-properties fo:margin-top="0.1cm" fo:margin-bottom="0cm"/>
      <style:text-properties style:font-size-asian="20pt" style:font-size-complex="20pt" fo:hyphenate="false" loext:hyphenation-no-caps="false" loext:hyphenation-no-last-word="false"/>
    </style:style>
    <style:style style:name="Content-outline8" style:family="presentation" style:parent-style-name="Content-outline7">
      <style:paragraph-properties fo:margin-top="0.1cm" fo:margin-bottom="0cm"/>
      <style:text-properties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horizontal-align="right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0081a1" loext:opacity="100%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chem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c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em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eme-outline1" style:family="presentation">
      <style:graphic-properties draw:stroke="none" draw:fill="none" draw:auto-grow-height="false" draw:fit-to-size="false" style:shrink-to-fit="true">
        <text:list-style style:name="Sc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eme-outline2" style:family="presentation" style:parent-style-name="Schem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cheme-outline3" style:family="presentation" style:parent-style-name="Schem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cheme-outline4" style:family="presentation" style:parent-style-name="Schem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cheme-outline5" style:family="presentation" style:parent-style-name="Scheme-outline4">
      <style:paragraph-properties fo:margin-top="0.1cm" fo:margin-bottom="0cm"/>
      <style:text-properties fo:font-size="20pt" style:font-size-asian="20pt" style:font-size-complex="20pt"/>
    </style:style>
    <style:style style:name="Scheme-outline6" style:family="presentation" style:parent-style-name="Scheme-outline5">
      <style:paragraph-properties fo:margin-top="0.1cm" fo:margin-bottom="0cm"/>
      <style:text-properties fo:font-size="20pt" style:font-size-asian="20pt" style:font-size-complex="20pt"/>
    </style:style>
    <style:style style:name="Scheme-outline7" style:family="presentation" style:parent-style-name="Scheme-outline6">
      <style:paragraph-properties fo:margin-top="0.1cm" fo:margin-bottom="0cm"/>
      <style:text-properties fo:font-size="20pt" style:font-size-asian="20pt" style:font-size-complex="20pt"/>
    </style:style>
    <style:style style:name="Scheme-outline8" style:family="presentation" style:parent-style-name="Scheme-outline7">
      <style:paragraph-properties fo:margin-top="0.1cm" fo:margin-bottom="0cm"/>
      <style:text-properties fo:font-size="20pt" style:font-size-asian="20pt" style:font-size-complex="20pt"/>
    </style:style>
    <style:style style:name="Scheme-outline9" style:family="presentation" style:parent-style-name="Scheme-outline8">
      <style:paragraph-properties fo:margin-top="0.1cm" fo:margin-bottom="0cm"/>
      <style:text-properties fo:font-size="20pt" style:font-size-asian="20pt" style:font-size-complex="20pt"/>
    </style:style>
    <style:style style:name="Scheme-subtitle" style:family="presentation">
      <style:graphic-properties draw:stroke="none" draw:fill="none" draw:textarea-vertical-align="middle">
        <text:list-style style:name="Sc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eme-title" style:family="presentation">
      <style:graphic-properties draw:stroke="none" draw:fill="none" draw:textarea-vertical-align="middle">
        <text:list-style style:name="Sc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solid" svg:stroke-width="0.212cm" svg:stroke-color="#0081a1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6" style:family="graphic" style:parent-style-name="standard">
      <style:graphic-properties draw:stroke="solid" svg:stroke-width="0.212cm" svg:stroke-color="#94c5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7" style:family="graphic" style:parent-style-name="standard">
      <style:graphic-properties draw:stroke="solid" svg:stroke-width="0.212cm" svg:stroke-color="#fbc8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8" style:family="graphic" style:parent-style-name="standard">
      <style:graphic-properties draw:stroke="solid" svg:stroke-width="0.212cm" svg:stroke-color="#e42a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>
      <style:graphic-properties style:writing-mode="lr-tb" loext:decorative="false"/>
    </style:style>
    <style:style style:name="Mgr11" style:family="graphic" style:parent-style-name="standard">
      <style:graphic-properties draw:stroke="none" svg:stroke-width="0.071cm" svg:stroke-linecap="butt" draw:fill="solid" draw:fill-color="#1ba07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.071cm" svg:stroke-linecap="butt" draw:fill="solid" draw:fill-color="#538bc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.071cm" svg:stroke-linecap="butt" draw:fill="solid" draw:fill-color="#2ca2c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.071cm" svg:stroke-linecap="butt" draw:fill="solid" draw:fill-color="#9ac75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5" style:family="graphic" style:parent-style-name="standard">
      <style:graphic-properties draw:stroke="solid" svg:stroke-width="0.035cm" svg:stroke-color="#9ac758" draw:marker-end="msArrowOpenEnd_20_5_20_35" draw:marker-end-width="0.245cm" draw:marker-end-center="false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6" style:family="graphic" style:parent-style-name="standard">
      <style:graphic-properties draw:stroke="solid" svg:stroke-width="0.035cm" svg:stroke-color="#538bc5" draw:marker-end="msArrowOpenEnd_20_5_20_35" draw:marker-end-width="0.245cm" draw:marker-end-center="false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7" style:family="graphic" style:parent-style-name="standard">
      <style:graphic-properties draw:stroke="solid" svg:stroke-width="0.035cm" svg:stroke-color="#1ba079" draw:marker-end="msArrowOpenEnd_20_5_20_35" draw:marker-end-width="0.245cm" draw:marker-end-center="false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8" style:family="graphic" style:parent-style-name="standard">
      <style:graphic-properties draw:stroke="solid" svg:stroke-width="0.035cm" svg:stroke-color="#538bc5" draw:stroke-linejoin="round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9" style:family="graphic" style:parent-style-name="standard">
      <style:graphic-properties draw:stroke="solid" svg:stroke-width="0.035cm" svg:stroke-color="#1ba079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Content-outline1">
      <style:graphic-properties fo:min-height="0.101cm" loext:decorative="false"/>
      <style:paragraph-properties style:writing-mode="lr-tb"/>
    </style:style>
    <style:style style:name="Mpr4" style:family="presentation" style:parent-style-name="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Schem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Schem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Schem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SF UI Display Light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style:paragraph-properties fo:text-align="start"/>
      <style:text-properties fo:font-size="14pt" style:font-size-asian="14pt" style:font-size-complex="14pt"/>
    </style:style>
    <style:style style:name="MP11" style:family="paragraph">
      <loext:graphic-properties draw:fill="solid" draw:fill-color="#1ba07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F UI Display Light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2" style:family="paragraph">
      <loext:graphic-properties draw:fill="solid" draw:fill-color="#538bc5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F UI Display Light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3" style:family="paragraph">
      <loext:graphic-properties draw:fill="solid" draw:fill-color="#2ca2ca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F UI Display Light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4" style:family="paragraph">
      <loext:graphic-properties draw:fill="solid" draw:fill-color="#9ac758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F UI Display Light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F UI Display Light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6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SF UI Display Light" fo:font-size="10pt" fo:letter-spacing="normal" fo:language="ru" fo:country="RU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►">
        <style:list-level-properties text:space-before="0.3cm" text:min-label-width="0.9cm"/>
        <style:text-properties fo:font-family="OpenSymbol" style:font-charset="x-symbol" style:use-window-font-color="true" fo:font-size="75%"/>
      </text:list-level-style-bullet>
      <text:list-level-style-bullet text:level="2" text:bullet-char="►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►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►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►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►">
        <style:list-level-properties text:space-before="6.6cm" text:min-label-width="0.6cm"/>
        <style:text-properties fo:font-family="OpenSymbol" style:font-charset="x-symbol" style:use-window-font-color="true" fo:font-size="75%"/>
      </text:list-level-style-bullet>
      <text:list-level-style-bullet text:level="7" text:bullet-char="►">
        <style:list-level-properties text:space-before="7.8cm" text:min-label-width="0.6cm"/>
        <style:text-properties fo:font-family="OpenSymbol" style:font-charset="x-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НПО Криста, максимум контента">
        <loext:theme-colors loext:name="Стандартная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Текст 2" draw:style-name="Mgr3" draw:text-style-name="MP5" draw:layer="backgroundobjects" svg:width="20.396cm" svg:height="3.994cm" svg:x="2.499cm" svg:y="3.7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27" draw:style-name="Mgr4">
        <draw:connector draw:name="Прямая соединительная линия 7" draw:style-name="Mgr5" draw:text-style-name="MP6" draw:layer="layout" draw:type="line" svg:x1="25.405cm" svg:y1="14.287cm" svg:x2="5.099cm" svg:y2="14.292cm" svg:d="M25405 14287l-20306 5" svg:viewBox="0 0 20307 6">
          <text:p/>
        </draw:connector>
        <draw:connector draw:name="Прямая соединительная линия 9" draw:style-name="Mgr6" draw:text-style-name="MP6" draw:layer="layout" draw:type="line" svg:x1="5.155cm" svg:y1="14.287cm" svg:x2="3.35cm" svg:y2="14.292cm" svg:d="M5155 14287l-1805 5" svg:viewBox="0 0 1806 6">
          <text:p/>
        </draw:connector>
        <draw:connector draw:name="Прямая соединительная линия 11" draw:style-name="Mgr7" draw:text-style-name="MP6" draw:layer="layout" draw:type="line" svg:x1="3.465cm" svg:y1="14.287cm" svg:x2="1.459cm" svg:y2="14.292cm" svg:d="M3465 14287l-2006 5" svg:viewBox="0 0 2007 6">
          <text:p/>
        </draw:connector>
        <draw:connector draw:name="Прямая соединительная линия 12" draw:style-name="Mgr8" draw:text-style-name="MP6" draw:layer="layout" draw:type="line" svg:x1="1.703cm" svg:y1="14.287cm" svg:x2="0cm" svg:y2="14.292cm" svg:d="M1703 14287l-1703 5" svg:viewBox="0 0 1704 6">
          <text:p/>
        </draw:connector>
      </draw:g>
      <draw:frame draw:name="Рисунок 7" draw:style-name="Mgr9" draw:text-style-name="MP6" draw:layer="backgroundobjects" svg:width="4.194cm" svg:height="1.994cm" svg:x="0.299cm" svg:y="0cm">
        <draw:image xlink:href="Pictures/100000000000016C000000AD665F3482.jpg" xlink:type="simple" xlink:show="embed" xlink:actuate="onLoad" draw:mime-type="image/jpeg">
          <text:p/>
        </draw:image>
        <svg:desc>logo-02.jpg</svg:desc>
      </draw:frame>
      <draw:frame presentation:style-name="Title-title" draw:layer="backgroundobjects" svg:width="19.832cm" svg:height="1.483cm" svg:x="4.297cm" svg:y="0.511cm" presentation:class="title" presentation:placeholder="true">
        <draw:text-box/>
      </draw:frame>
      <draw:frame presentation:style-name="Title-outline1" draw:layer="backgroundobjects" svg:width="22.859cm" svg:height="8.286cm" svg:x="1.27cm" svg:y="2.666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Рисунок 7" draw:style-name="Mgr9" draw:text-style-name="MP6" draw:layer="backgroundobjects" svg:width="4.194cm" svg:height="1.994cm" svg:x="0.3cm" svg:y="0cm">
        <draw:image xlink:href="Pictures/100000000000016C000000AD665F3482.jpg" xlink:type="simple" xlink:show="embed" xlink:actuate="onLoad" draw:mime-type="image/jpeg">
          <text:p/>
        </draw:image>
        <svg:desc>logo-02.jpg</svg:desc>
      </draw:frame>
      <draw:frame draw:name="PlaceHolder 1" presentation:style-name="Content-title" draw:layer="backgroundobjects" svg:width="19.789cm" svg:height="1.261cm" svg:x="4.339cm" svg:y="0.56cm" presentation:class="title" presentation:placeholder="true" presentation:user-transformed="true">
        <draw:text-box/>
      </draw:frame>
      <draw:frame draw:name="PlaceHolder 2" presentation:style-name="Mpr3" draw:layer="backgroundobjects" svg:width="22.858cm" svg:height="9.151cm" svg:x="1.27cm" svg:y="2.477cm" presentation:class="outline" presentation:user-transformed="tru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" draw:text-style-name="MP8" draw:layer="backgroundobjects" svg:width="8.049cm" svg:height="0.983cm" svg:x="8.686cm" svg:y="13.016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4" draw:text-style-name="MP8" draw:layer="backgroundobjects" svg:width="5.916cm" svg:height="0.983cm" svg:x="18.211cm" svg:y="13.016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5" presentation:style-name="Mpr4" draw:text-style-name="MP8" draw:layer="backgroundobjects" svg:width="5.916cm" svg:height="0.983cm" svg:x="1.27cm" svg:y="13.016cm" presentation:class="date-time" presentation:user-transformed="true">
        <draw:text-box>
          <text:p text:style-name="MP10"><text:span text:style-name="MT1"><presentation:date-time/></text:span></text:p>
        </draw:text-box>
      </draw:frame>
      <presentation:notes style:page-layout-name="PM0">
        <draw:page-thumbnail presentation:style-name="Content-title" draw:layer="backgroundobjects" svg:width="0.001cm" svg:height="0.001cm" svg:x="0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cheme" style:page-layout-name="PM1" draw:style-name="Mdp1">
      <loext:theme loext:name="НПО Криста, максимум контента">
        <loext:theme-colors loext:name="Стандартная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Текст 2" draw:style-name="Mgr3" draw:text-style-name="MP5" draw:layer="backgroundobjects" svg:width="20.396cm" svg:height="3.994cm" svg:x="2.499cm" svg:y="3.7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27" draw:style-name="Mgr4">
        <draw:connector draw:name="Прямая соединительная линия 7" draw:style-name="Mgr5" draw:text-style-name="MP6" draw:layer="layout" draw:type="line" svg:x1="25.405cm" svg:y1="14.287cm" svg:x2="5.099cm" svg:y2="14.292cm" svg:d="M25405 14287h-10153v5h-10153" svg:viewBox="0 0 20307 6">
          <text:p/>
        </draw:connector>
        <draw:connector draw:name="Прямая соединительная линия 9" draw:style-name="Mgr6" draw:text-style-name="MP6" draw:layer="layout" draw:type="line" svg:x1="5.155cm" svg:y1="14.287cm" svg:x2="3.35cm" svg:y2="14.292cm" svg:d="M5155 14287h-902v5h-903" svg:viewBox="0 0 1806 6">
          <text:p/>
        </draw:connector>
        <draw:connector draw:name="Прямая соединительная линия 11" draw:style-name="Mgr7" draw:text-style-name="MP6" draw:layer="layout" draw:type="line" svg:x1="3.465cm" svg:y1="14.287cm" svg:x2="1.459cm" svg:y2="14.292cm" svg:d="M3465 14287h-1003v5h-1003" svg:viewBox="0 0 2007 6">
          <text:p/>
        </draw:connector>
        <draw:connector draw:name="Прямая соединительная линия 12" draw:style-name="Mgr8" draw:text-style-name="MP6" draw:layer="layout" draw:type="line" svg:x1="1.703cm" svg:y1="14.287cm" svg:x2="0cm" svg:y2="14.292cm" svg:d="M1703 14287h-851v5h-852" svg:viewBox="0 0 1704 6">
          <text:p/>
        </draw:connector>
      </draw:g>
      <draw:frame draw:name="Рисунок 32" draw:style-name="Mgr9" draw:text-style-name="MP6" draw:layer="backgroundobjects" svg:width="4.194cm" svg:height="1.994cm" svg:x="0.299cm" svg:y="0cm">
        <draw:image xlink:href="Pictures/100000000000016C000000AD665F3482.jpg" xlink:type="simple" xlink:show="embed" xlink:actuate="onLoad" draw:mime-type="image/jpeg">
          <text:p/>
        </draw:image>
        <svg:desc>logo-02.jpg</svg:desc>
      </draw:frame>
      <draw:g draw:name="Группа 47" draw:style-name="Mgr10">
        <draw:custom-shape draw:name="Шестиугольник 34" draw:style-name="Mgr11" draw:text-style-name="MP11" draw:layer="layout" svg:width="4.521cm" svg:height="3.897cm" svg:x="8.453cm" svg:y="6.293cm">
          <text:p/>
          <draw:enhanced-geometry draw:mirror-horizontal="false" draw:mirror-vertical="true" svg:viewBox="0 0 0 0" draw:glue-points="?f23 ?f8 ?f6 ?f10 ?f5 ?f10 0 ?f8 ?f5 ?f9 ?f6 ?f9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Шестиугольник 36" draw:style-name="Mgr12" draw:text-style-name="MP12" draw:layer="layout" svg:width="4.521cm" svg:height="3.897cm" svg:x="12.364cm" svg:y="4.129cm">
          <text:p/>
          <draw:enhanced-geometry draw:mirror-horizontal="false" draw:mirror-vertical="true" svg:viewBox="0 0 0 0" draw:glue-points="?f23 ?f8 ?f6 ?f10 ?f5 ?f10 0 ?f8 ?f5 ?f9 ?f6 ?f9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Шестиугольник 38" draw:style-name="Mgr13" draw:text-style-name="MP13" draw:layer="layout" svg:width="4.521cm" svg:height="3.897cm" svg:x="16.242cm" svg:y="6.293cm">
          <text:p/>
          <draw:enhanced-geometry draw:mirror-horizontal="false" draw:mirror-vertical="true" svg:viewBox="0 0 0 0" draw:glue-points="?f23 ?f8 ?f6 ?f10 ?f5 ?f10 0 ?f8 ?f5 ?f9 ?f6 ?f9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Шестиугольник 40" draw:style-name="Mgr14" draw:text-style-name="MP14" draw:layer="layout" svg:width="4.521cm" svg:height="3.897cm" svg:x="4.576cm" svg:y="4.129cm">
          <text:p/>
          <draw:enhanced-geometry draw:mirror-horizontal="false" draw:mirror-vertical="true" svg:viewBox="0 0 0 0" draw:glue-points="?f23 ?f8 ?f6 ?f10 ?f5 ?f10 0 ?f8 ?f5 ?f9 ?f6 ?f9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Дуга 42" draw:style-name="Mgr15" draw:text-style-name="MP5" draw:layer="layout" svg:width="3.027cm" svg:height="3.027cm" svg:x="7.609cm" svg:y="4.577cm">
          <text:p/>
          <draw:enhanced-geometry draw:mirror-horizontal="false" draw:mirror-vertical="false" svg:viewBox="0 0 0 0" draw:text-areas="?f36 ?f42 ?f24 ?f30" draw:type="ooxml-arc" draw:modifiers="14138909 265456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 draw:handle-position-x="?f16" draw:handle-position-y="?f18"/>
            <draw:handle draw:handle-position="?f19 ?f20" draw:handle-position-x="?f19" draw:handle-position-y="?f20"/>
          </draw:enhanced-geometry>
        </draw:custom-shape>
        <draw:custom-shape draw:name="Дуга 43" draw:style-name="Mgr16" draw:text-style-name="MP5" draw:layer="layout" svg:width="3.027cm" svg:height="3.027cm" svg:x="15.408cm" svg:y="4.577cm">
          <text:p/>
          <draw:enhanced-geometry draw:mirror-horizontal="false" draw:mirror-vertical="false" svg:viewBox="0 0 0 0" draw:text-areas="?f36 ?f42 ?f24 ?f30" draw:type="ooxml-arc" draw:modifiers="14138909 265456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 draw:handle-position-x="?f16" draw:handle-position-y="?f18"/>
            <draw:handle draw:handle-position="?f19 ?f20" draw:handle-position-x="?f19" draw:handle-position-y="?f20"/>
          </draw:enhanced-geometry>
        </draw:custom-shape>
        <draw:custom-shape draw:name="Дуга 44" draw:style-name="Mgr17" draw:text-style-name="MP5" draw:layer="layout" svg:width="3.027cm" svg:height="3.027cm" svg:x="11.508cm" svg:y="6.729cm">
          <text:p/>
          <draw:enhanced-geometry draw:mirror-horizontal="false" draw:mirror-vertical="true" svg:viewBox="0 0 0 0" draw:text-areas="?f36 ?f42 ?f24 ?f30" draw:type="ooxml-arc" draw:modifiers="14138909 265456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 draw:handle-position-x="?f16" draw:handle-position-y="?f18"/>
            <draw:handle draw:handle-position="?f19 ?f20" draw:handle-position-x="?f19" draw:handle-position-y="?f20"/>
          </draw:enhanced-geometry>
        </draw:custom-shape>
        <draw:custom-shape draw:name="Шестиугольник 45" draw:style-name="Mgr18" draw:text-style-name="MP15" draw:layer="layout" svg:width="4.521cm" svg:height="3.897cm" svg:x="20.174cm" svg:y="4.129cm">
          <text:p/>
          <draw:enhanced-geometry draw:mirror-horizontal="false" draw:mirror-vertical="true" svg:viewBox="0 0 0 0" draw:glue-points="?f23 ?f8 ?f6 ?f10 ?f5 ?f10 0 ?f8 ?f5 ?f9 ?f6 ?f9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Шестиугольник 46" draw:style-name="Mgr19" draw:text-style-name="MP15" draw:layer="layout" svg:width="4.521cm" svg:height="3.897cm" svg:x="0.699cm" svg:y="6.293cm">
          <text:p/>
          <draw:enhanced-geometry draw:mirror-horizontal="false" draw:mirror-vertical="true" svg:viewBox="0 0 0 0" draw:glue-points="?f23 ?f8 ?f6 ?f10 ?f5 ?f10 0 ?f8 ?f5 ?f9 ?f6 ?f9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aximum="?f1" draw:handle-range-x-minimum="0" draw:handle-position="?f5 0" draw:handle-position-x="?f5" draw:handle-position-y="0"/>
          </draw:enhanced-geometry>
        </draw:custom-shape>
      </draw:g>
      <draw:frame draw:name="PlaceHolder 1" presentation:style-name="Mpr7" draw:text-style-name="MP17" draw:layer="backgroundobjects" svg:width="3.194cm" svg:height="0.755cm" svg:x="21.301cm" svg:y="13.184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Scheme-title" draw:layer="backgroundobjects" svg:width="22.859cm" svg:height="2.385cm" svg:x="1.27cm" svg:y="0.57cm" presentation:class="title" presentation:placeholder="true">
        <draw:text-box/>
      </draw:frame>
      <draw:frame presentation:style-name="Schem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cheme-title" draw:layer="backgroundobjects" svg:width="0.001cm" svg:height="0.001cm" svg:x="0cm" svg:y="2.123cm" presentation:class="page"/>
        <draw:frame presentation:style-name="Schem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8-08-27T14:01:24</meta:creation-date>
    <meta:initial-creator>Расторгуев</meta:initial-creator>
    <dc:language>en-US</dc:language>
    <dc:date>2026-05-13T03:11:02.960722700</dc:date>
    <meta:editing-cycles>421</meta:editing-cycles>
    <dc:title>Слайд 1</dc:title>
    <meta:editing-duration>P1DT4H12M44S</meta:editing-duration>
    <meta:generator>LibreOffice/25.2.7.2$Windows_X86_64 LibreOffice_project/5cbfd1ab6520636bb5f7b99185aa69bd7456825d</meta:generator>
    <meta:document-statistic meta:object-count="103"/>
    <meta:user-defined meta:name="AppVersion">15.0000</meta:user-defined>
    <meta:user-defined meta:name="PresentationFormat">Экран (16:9)</meta:user-defined>
    <meta:user-defined meta:name="Slides" meta:value-type="float">7</meta:user-defined>
  </office:meta>
</office:document-meta>
</file>